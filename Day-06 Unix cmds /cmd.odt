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ximsoft@aximsoft-supreeth:~$ ls</text:p>
      <text:p text:style-name="Standard">chrome.txt <text:s/>Documents <text:s/>Music <text:s text:c="6"/>node.txt <text:s/>Postman <text:s/>snap <text:s text:c="6"/>texta.txt</text:p>
      <text:p text:style-name="Standard">Desktop <text:s text:c="4"/>Downloads <text:s/>Node-learn <text:s/>Pictures <text:s/>Public <text:s text:c="2"/>Templates <text:s/>Videos</text:p>
      <text:p text:style-name="Standard">aximsoft@aximsoft-supreeth:~$ cd Desktop</text:p>
      <text:p text:style-name="Standard">aximsoft@aximsoft-supreeth:~/Desktop$ ls</text:p>
      <text:p text:style-name="Standard">topicstolearn.txt</text:p>
      <text:p text:style-name="Standard">aximsoft@aximsoft-supreeth:~/Desktop$ cd touch text</text:p>
      <text:p text:style-name="Standard">bash: cd: too many arguments</text:p>
      <text:p text:style-name="Standard">aximsoft@aximsoft-supreeth:~/Desktop$ <text:s/>touch text</text:p>
      <text:p text:style-name="Standard">aximsoft@aximsoft-supreeth:~/Desktop$ ls</text:p>
      <text:p text:style-name="Standard">text <text:s/>topicstolearn.txt</text:p>
      <text:p text:style-name="Standard">aximsoft@aximsoft-supreeth:~/Desktop$ ln text text-hard-link</text:p>
      <text:p text:style-name="Standard">aximsoft@aximsoft-supreeth:~/Desktop$ ls</text:p>
      <text:p text:style-name="Standard">text <text:s/>text-hard-link <text:s/>topicstolearn.txt</text:p>
      <text:p text:style-name="Standard">aximsoft@aximsoft-supreeth:~/Desktop$ ls </text:p>
      <text:p text:style-name="Standard">text <text:s/>text-hard-link <text:s/>topicstolearn.txt</text:p>
      <text:p text:style-name="Standard">aximsoft@aximsoft-supreeth:~/Desktop$ <text:s/>ls v</text:p>
      <text:p text:style-name="Standard">ls: cannot access 'v': No such file or directory</text:p>
      <text:p text:style-name="Standard">aximsoft@aximsoft-supreeth:~/Desktop$ ls -v</text:p>
      <text:p text:style-name="Standard">text <text:s/>text-hard-link <text:s/>topicstolearn.txt</text:p>
      <text:p text:style-name="Standard">aximsoft@aximsoft-supreeth:~/Desktop$ ls -h</text:p>
      <text:p text:style-name="Standard">text <text:s/>text-hard-link <text:s/>topicstolearn.txt</text:p>
      <text:p text:style-name="Standard">aximsoft@aximsoft-supreeth:~/Desktop$ ln -s text text-sym-link</text:p>
      <text:p text:style-name="Standard">aximsoft@aximsoft-supreeth:~/Desktop$ ls</text:p>
      <text:p text:style-name="Standard">text <text:s/>text-hard-link <text:s/>text-sym-link <text:s/>topicstolearn.txt</text:p>
      <text:p text:style-name="Standard">aximsoft@aximsoft-supreeth:~/Desktop$ rm text</text:p>
      <text:p text:style-name="Standard">aximsoft@aximsoft-supreeth:~/Desktop$ ls</text:p>
      <text:p text:style-name="Standard">text-hard-link <text:s/>text-sym-link <text:s/>topicstolearn.txt</text:p>
      <text:p text:style-name="Standard">aximsoft@aximsoft-supreeth:~/Desktop$ cd </text:p>
      <text:p text:style-name="Standard">aximsoft@aximsoft-supreeth:~$ cd Desktop</text:p>
      <text:p text:style-name="Standard">aximsoft@aximsoft-supreeth:~/Desktop$ ls</text:p>
      <text:p text:style-name="Standard">text-hard-link <text:s/>text-sym-link <text:s/>topicstolearn.txt</text:p>
      <text:p text:style-name="Standard">aximsoft@aximsoft-supreeth:~/Desktop$ mkdir Testpro</text:p>
      <text:p text:style-name="Standard">aximsoft@aximsoft-supreeth:~/Desktop$ cd Testpro</text:p>
      <text:p text:style-name="Standard">aximsoft@aximsoft-supreeth:~/Desktop/Testpro$ ls</text:p>
      <text:p text:style-name="Standard">aximsoft@aximsoft-supreeth:~/Desktop/Testpro$ ls</text:p>
      <text:p text:style-name="Standard">aximsoft@aximsoft-supreeth:~/Desktop/Testpro$ what isls</text:p>
      <text:p text:style-name="Standard">Command 'what' not found, did you mean:</text:p>
      <text:p text:style-name="Standard"><text:s text:c="2"/>command 'wham' from deb wham-align (0.1.5-8)</text:p>
      <text:p text:style-name="Standard"><text:s text:c="2"/>command 'jhat' from deb openjdk-8-jdk-headless (8u492-ga~us2-0ubuntu1~24.04.1)</text:p>
      <text:p text:style-name="Standard"><text:s text:c="2"/>command 'chat' from deb ppp (2.4.9-1+1.1ubuntu1)</text:p>
      <text:p text:style-name="Standard"><text:s text:c="2"/>command 'phat' from deb phat-utils (1.6-2build5)</text:p>
      <text:p text:style-name="Standard">Try: sudo apt install &lt;deb name&gt;</text:p>
      <text:p text:style-name="Standard">aximsoft@aximsoft-supreeth:~/Desktop/Testpro$ whatis ls</text:p>
      <text:p text:style-name="Standard">ls (1) <text:s text:c="14"/>- list directory contents</text:p>
      <text:p text:style-name="Standard">aximsoft@aximsoft-supreeth:~/Desktop/Testpro$ whatis cd</text:p>
      <text:p text:style-name="Standard">cd: nothing appropriate.</text:p>
      <text:p text:style-name="Standard">aximsoft@aximsoft-supreeth:~/Desktop/Testpro$ whatis cat</text:p>
      <text:p text:style-name="Standard">cat (1) <text:s text:c="13"/>- concatenate files and print on the standard output</text:p>
      <text:p text:style-name="Standard">aximsoft@aximsoft-supreeth:~/Desktop/Testpro$ whatis git</text:p>
      <text:p text:style-name="Standard">Git (3pm) <text:s text:c="11"/>- Perl interface to the Git version control system</text:p>
      <text:p text:style-name="Standard">git (1) <text:s text:c="13"/>- the stupid content tracker</text:p>
      <text:p text:style-name="Standard"><text:soft-page-break/>aximsoft@aximsoft-supreeth:~/Desktop/Testpro$ ls</text:p>
      <text:p text:style-name="Standard">aximsoft@aximsoft-supreeth:~/Desktop/Testpro$ cd ..</text:p>
      <text:p text:style-name="Standard">aximsoft@aximsoft-supreeth:~/Desktop$ cd ..</text:p>
      <text:p text:style-name="Standard">aximsoft@aximsoft-supreeth:~$ ls</text:p>
      <text:p text:style-name="Standard">chrome.txt <text:s/>Documents <text:s/>Music <text:s text:c="6"/>node.txt <text:s/>Postman <text:s/>snap <text:s text:c="6"/>texta.txt</text:p>
      <text:p text:style-name="Standard">Desktop <text:s text:c="4"/>Downloads <text:s/>Node-learn <text:s/>Pictures <text:s/>Public <text:s text:c="2"/>Templates <text:s/>Videos</text:p>
      <text:p text:style-name="Standard">aximsoft@aximsoft-supreeth:~$ ls -ada</text:p>
      <text:p text:style-name="Standard">.</text:p>
      <text:p text:style-name="Standard">aximsoft@aximsoft-supreeth:~$ ls sac</text:p>
      <text:p text:style-name="Standard">ls: cannot access 'sac': No such file or directory</text:p>
      <text:p text:style-name="Standard">aximsoft@aximsoft-supreeth:~$ ls</text:p>
      <text:p text:style-name="Standard">chrome.txt <text:s/>Documents <text:s/>Music <text:s text:c="6"/>node.txt <text:s/>Postman <text:s/>snap <text:s text:c="6"/>texta.txt</text:p>
      <text:p text:style-name="Standard">Desktop <text:s text:c="4"/>Downloads <text:s/>Node-learn <text:s/>Pictures <text:s/>Public <text:s text:c="2"/>Templates <text:s/>Videos</text:p>
      <text:p text:style-name="Standard">aximsoft@aximsoft-supreeth:~$ ls &gt; ls-output.txt</text:p>
      <text:p text:style-name="Standard">aximsoft@aximsoft-supreeth:~$ ls</text:p>
      <text:p text:style-name="Standard">chrome.txt <text:s/>Documents <text:s/>ls-output.txt <text:s/>Node-learn <text:s/>Pictures <text:s/>Public <text:s/>Templates <text:s/>Videos</text:p>
      <text:p text:style-name="Standard">Desktop <text:s text:c="4"/>Downloads <text:s/>Music <text:s text:c="9"/>node.txt <text:s text:c="3"/>Postman <text:s text:c="2"/>snap <text:s text:c="3"/>texta.txt</text:p>
      <text:p text:style-name="Standard">aximsoft@aximsoft-supreeth:~$ ls</text:p>
      <text:p text:style-name="Standard">chrome.txt <text:s/>Documents <text:s/>ls-output.txt <text:s/>Node-learn <text:s/>Pictures <text:s/>Public <text:s/>Templates <text:s/>Videos</text:p>
      <text:p text:style-name="Standard">Desktop <text:s text:c="4"/>Downloads <text:s/>Music <text:s text:c="9"/>node.txt <text:s text:c="3"/>Postman <text:s text:c="2"/>snap <text:s text:c="3"/>texta.txt</text:p>
      <text:p text:style-name="Standard">aximsoft@aximsoft-supreeth:~$ ^C</text:p>
      <text:p text:style-name="Standard">aximsoft@aximsoft-supreeth:~$ cat ls-output.txt</text:p>
      <text:p text:style-name="Standard">chrome.txt</text:p>
      <text:p text:style-name="Standard">Desktop</text:p>
      <text:p text:style-name="Standard">Documents</text:p>
      <text:p text:style-name="Standard">Downloads</text:p>
      <text:p text:style-name="Standard">ls-output.txt</text:p>
      <text:p text:style-name="Standard">Music</text:p>
      <text:p text:style-name="Standard">Node-learn</text:p>
      <text:p text:style-name="Standard">node.txt</text:p>
      <text:p text:style-name="Standard">Pictures</text:p>
      <text:p text:style-name="Standard">Postman</text:p>
      <text:p text:style-name="Standard">Public</text:p>
      <text:p text:style-name="Standard">snap</text:p>
      <text:p text:style-name="Standard">Templates</text:p>
      <text:p text:style-name="Standard">texta.txt</text:p>
      <text:p text:style-name="Standard">Videos</text:p>
      <text:p text:style-name="Standard">aximsoft@aximsoft-supreeth:~$ ls | less</text:p>
      <text:p text:style-name="Standard">aximsoft@aximsoft-supreeth:~$ ls</text:p>
      <text:p text:style-name="Standard">chrome.txt <text:s/>Documents <text:s/>ls-output.txt <text:s/>Node-learn <text:s/>Pictures <text:s/>Public <text:s/>Templates <text:s/>Videos</text:p>
      <text:p text:style-name="Standard">Desktop <text:s text:c="4"/>Downloads <text:s/>Music <text:s text:c="9"/>node.txt <text:s text:c="3"/>Postman <text:s text:c="2"/>snap <text:s text:c="3"/>texta.txt</text:p>
      <text:p text:style-name="Standard">aximsoft@aximsoft-supreeth:~$ echo hello</text:p>
      <text:p text:style-name="Standard">hello</text:p>
      <text:p text:style-name="Standard">aximsoft@aximsoft-supreeth:~$ ls</text:p>
      <text:p text:style-name="Standard">chrome.txt <text:s/>Documents <text:s/>ls-output.txt <text:s/>Node-learn <text:s/>Pictures <text:s/>Public <text:s/>Templates <text:s/>Videos</text:p>
      <text:p text:style-name="Standard">Desktop <text:s text:c="4"/>Downloads <text:s/>Music <text:s text:c="9"/>node.txt <text:s text:c="3"/>Postman <text:s text:c="2"/>snap <text:s text:c="3"/>texta.txt</text:p>
      <text:p text:style-name="Standard">aximsoft@aximsoft-supreeth:~$ echo D*</text:p>
      <text:p text:style-name="Standard">Desktop Documents Downloads</text:p>
      <text:p text:style-name="Standard">aximsoft@aximsoft-supreeth:~$ ;s</text:p>
      <text:p text:style-name="Standard">bash: syntax error near unexpected token `;'</text:p>
      <text:p text:style-name="Standard">aximsoft@aximsoft-supreeth:~$ ls</text:p>
      <text:p text:style-name="Standard">chrome.txt <text:s/>Documents <text:s/>ls-output.txt <text:s/>Node-learn <text:s/>Pictures <text:s/>Public <text:s/>Templates <text:s/>Videos</text:p>
      <text:p text:style-name="Standard"><text:soft-page-break/>Desktop <text:s text:c="4"/>Downloads <text:s/>Music <text:s text:c="9"/>node.txt <text:s text:c="3"/>Postman <text:s text:c="2"/>snap <text:s text:c="3"/>texta.txt</text:p>
      <text:p text:style-name="Standard">aximsoft@aximsoft-supreeth:~$ echo ((2*2))</text:p>
      <text:p text:style-name="Standard">bash: syntax error near unexpected token `('</text:p>
      <text:p text:style-name="Standard">aximsoft@aximsoft-supreeth:~$ echo <text:s/>$ ((2*2))</text:p>
      <text:p text:style-name="Standard">bash: syntax error near unexpected token `('</text:p>
      <text:p text:style-name="Standard">aximsoft@aximsoft-supreeth:~$ echo <text:s/>$((2*2))</text:p>
      <text:p text:style-name="Standard">4</text:p>
      <text:p text:style-name="Standard">aximsoft@aximsoft-supreeth:~$ echo $USER</text:p>
      <text:p text:style-name="Standard">aximsoft</text:p>
      <text:p text:style-name="Standard">aximsoft@aximsoft-supreeth:~$ cal</text:p>
      <text:p text:style-name="Standard">Command 'cal' not found, but can be installed with:</text:p>
      <text:p text:style-name="Standard">sudo apt install ncal</text:p>
      <text:p text:style-name="Standard">aximsoft@aximsoft-supreeth:~$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0T10:29:26.420343127</meta:creation-date>
    <dc:date>2026-06-10T10:29:33.085270502</dc:date>
    <meta:editing-duration>PT9S</meta:editing-duration>
    <meta:editing-cycles>1</meta:editing-cycles>
    <meta:document-statistic meta:table-count="0" meta:image-count="0" meta:object-count="0" meta:page-count="3" meta:paragraph-count="117" meta:word-count="438" meta:character-count="4893" meta:non-whitespace-character-count="4267"/>
    <meta:generator>LibreOffice/24.2.7.2$Linux_X86_64 LibreOffice_project/420$Build-2</meta:generator>
  </office:meta>
</office:document-meta>
</file>